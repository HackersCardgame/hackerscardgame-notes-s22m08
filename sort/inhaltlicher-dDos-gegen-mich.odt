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uten Tag<text:line-break/><text:line-break/>der eine oder andere hat es vielleicht schon gemerkt, ich schreibe wieder mehr Mails in letzter Zeit.<text:line-break/><text:line-break/>Ich gehe davon aus, dass die Management Cockpits (sowohl das der PDAG neben dem Waffenplatz, als auch das der Zürich Versicherung) all diese Akten und Personal in Reserve vorbereitet hat.<text:line-break/><text:line-break/>Wenn die Täter wegen irgend etwas auffliegen fangen die jeweils immer an all die anderen Mordakten an mich zu senden über für mich nicht nachvollziehbare Kommunikationskanäle und Manipulationstechniken.<text:line-break/><text:line-break/>Die wüssten dass ich Autist bin, ein Autist ist grundsätzlich stur und versucht logisch zu funktionieren. Also weiss der Autist dass er neue Aussagen oder Indizien weiter leiten muss weil er sich so mitschuldig machen würde. Vermutlich auch das Problem des Whistleblowers Julian Assange.<text:line-break/><text:line-break/>Ich gehe davon aus, dass für z.B. die Zürich Versicherung jeder nicht komplett gelöster Fall "Haben" darstellt, den die dann zum dümmsten Zeitpunkt weit oben aus ihrem Management Cockpit wieder frei schalten und so auch die Täter des vertuschten Falles als Waffe gegen mich instrumentalisieren können, oder mindestens für Psychoterror bzw. für psychologische Kriegsführung.<text:line-break/><text:line-break/>Diese meine Beobachtungen wirken ähnlich wie dieser Fall auf Twitter (Attachment)<text:line-break/><text:line-break/>Cyrnfr fgbc gelvat gb gevpx zr vagb orvat n juvfgyroybjre. Vs naq be jura V unir fbzrguvat V'yy yrg lbh xabj jura vg vf orfg.<text:line-break/><text:line-break/>Please stop trying to trick me into being a whistleblower. If and or when I have something I'll let you know when it is best.<text:line-break/><text:line-break/><text:line-break/>https://twitter.com/NewsByIan/status/746918280846139392<text:line-break/><text:line-break/><text:line-break/>Also auch wenn das noch nicht bewiesen ist, die Zürich Versicherung betreibt inhaltliche Denial of Service Attacks mit so halb aufgeklärten Rechtsfällen wo es oft um Tote oder Mord ging. Dazu nutzen diese worst case Trojaner, Malware, Backdoors und 0days die sie z.B. vom NSA/CIA bekommen bzw. vermutlich kaufen werden müsse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4T14:39:10.782000000</meta:creation-date>
    <dc:date>2022-08-15T07:13:59.279000000</dc:date>
    <meta:editing-duration>PT16H24M38S</meta:editing-duration>
    <meta:editing-cycles>1</meta:editing-cycles>
    <meta:document-statistic meta:table-count="0" meta:image-count="0" meta:object-count="0" meta:page-count="1" meta:paragraph-count="1" meta:word-count="288" meta:character-count="1894" meta:non-whitespace-character-count="1594"/>
    <meta:generator>LibreOffice/7.3.2.2$Windows_X86_64 LibreOffice_project/49f2b1bff42cfccbd8f788c8dc32c1c309559be0</meta:generator>
  </office:meta>
</office:document-meta>
</file>